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3000002A38AF9473A.png" manifest:media-type="image/png"/>
  <manifest:file-entry manifest:full-path="Pictures/10000001000004A3000002A0A3146DC9.png" manifest:media-type="image/png"/>
  <manifest:file-entry manifest:full-path="Pictures/10000001000004AA000002A46A22A71A.png" manifest:media-type="image/png"/>
  <manifest:file-entry manifest:full-path="Pictures/1000000100000495000002A37E192BC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5.667cm" style:rel-column-width="21845*"/>
    </style:style>
    <style:style style:name="Táblázat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áblázat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áblázat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áblázat1.C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áblázat1.A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áblázat1.B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áblázat1.C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62ae0" style:font-size-asian="12pt" style:font-size-complex="12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62ae0" officeooo:paragraph-rsid="00062ae0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5" style:family="paragraph" style:parent-style-name="Heading_20_3">
      <style:paragraph-properties fo:line-height="150%" fo:text-align="justify" style:justify-single-word="false"/>
      <style:text-properties style:font-name="Times New Roman" fo:font-size="12pt" officeooo:rsid="000f5187" officeooo:paragraph-rsid="000f5187" style:font-size-asian="12pt" style:font-size-complex="12pt"/>
    </style:style>
    <style:style style:name="P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7" style:family="paragraph" style:parent-style-name="Heading_20_3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8" style:family="paragraph" style:parent-style-name="Text_20_body" style:list-style-name="L2">
      <style:paragraph-properties fo:line-height="150%" fo:text-align="justify" style:justify-single-word="false"/>
      <style:text-properties officeooo:rsid="00062ae0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062ae0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officeooo:rsid="00062ae0" officeooo:paragraph-rsid="00062ae0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62ae0" officeooo:paragraph-rsid="00062ae0" style:font-size-asian="12pt" style:font-size-complex="12pt"/>
    </style:style>
    <style:style style:name="P13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6cbca" officeooo:paragraph-rsid="0006c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2">
      <style:paragraph-properties fo:line-height="150%" fo:text-align="justify" style:justify-single-word="false"/>
      <style:text-properties style:font-name="Times New Roman" fo:font-size="12pt" officeooo:rsid="00062ae0" officeooo:paragraph-rsid="00062ae0" style:font-size-asian="12pt" style:font-size-complex="12pt"/>
    </style:style>
    <style:style style:name="P16" style:family="paragraph" style:parent-style-name="Text_20_body" style:list-style-name="L3">
      <style:paragraph-properties fo:line-height="150%" fo:text-align="justify" style:justify-single-word="false"/>
      <style:text-properties officeooo:rsid="00062ae0"/>
    </style:style>
    <style:style style:name="P17" style:family="paragraph" style:parent-style-name="Text_20_body" style:list-style-name="L4">
      <style:paragraph-properties fo:line-height="150%" fo:text-align="justify" style:justify-single-word="false"/>
      <style:text-properties officeooo:rsid="00062ae0"/>
    </style:style>
    <style:style style:name="P18" style:family="paragraph" style:parent-style-name="Text_20_body" style:list-style-name="L5">
      <style:paragraph-properties fo:line-height="150%" fo:text-align="justify" style:justify-single-word="false"/>
      <style:text-properties officeooo:rsid="00062ae0"/>
    </style:style>
    <style:style style:name="P19" style:family="paragraph" style:parent-style-name="Text_20_body" style:list-style-name="L6">
      <style:paragraph-properties fo:line-height="150%" fo:text-align="justify" style:justify-single-word="false"/>
      <style:text-properties officeooo:rsid="00062ae0"/>
    </style:style>
    <style:style style:name="P20" style:family="paragraph" style:parent-style-name="Text_20_body" style:list-style-name="L7">
      <style:paragraph-properties fo:line-height="150%" fo:text-align="justify" style:justify-single-word="false"/>
      <style:text-properties officeooo:rsid="00062ae0"/>
    </style:style>
    <style:style style:name="P21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officeooo:rsid="00062ae0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6cbca" officeooo:paragraph-rsid="0006cbc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normal" officeooo:rsid="00080891" officeooo:paragraph-rsid="0008089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80891" officeooo:paragraph-rsid="00080891" style:font-size-asian="12pt" style:font-weight-asian="bold" style:font-size-complex="12pt" style:font-weight-complex="bold"/>
    </style:style>
    <style:style style:name="T1" style:family="text">
      <style:text-properties officeooo:rsid="0008d866"/>
    </style:style>
    <style:style style:name="T2" style:family="text">
      <style:text-properties officeooo:rsid="000fed55"/>
    </style:style>
    <style:style style:name="T3" style:family="text">
      <style:text-properties fo:font-weight="bold"/>
    </style:style>
    <style:style style:name="T4" style:family="text">
      <style:text-properties officeooo:rsid="0006cbca"/>
    </style:style>
    <style:style style:name="T5" style:family="text">
      <style:text-properties style:font-name="Times New Roman" fo:font-size="12pt" fo:font-weight="bold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06cbca" style:font-size-asian="12pt" style:font-size-complex="12pt"/>
    </style:style>
    <style:style style:name="T8" style:family="text">
      <style:text-properties officeooo:rsid="000f5187"/>
    </style:style>
    <style:style style:name="T9" style:family="text">
      <style:text-properties officeooo:rsid="000de4d2"/>
    </style:style>
    <style:style style:name="T10" style:family="text">
      <style:text-properties style:font-name="Times New Roman" fo:font-size="12pt" fo:font-weight="bold" officeooo:rsid="00091613" style:font-size-asian="12pt" style:font-size-complex="12pt"/>
    </style:style>
    <style:style style:name="T11" style:family="text">
      <style:text-properties style:font-name="Times New Roman" fo:font-size="12pt" fo:font-weight="bold" officeooo:rsid="000921cb" style:font-size-asian="12pt" style:font-size-complex="12pt"/>
    </style:style>
    <style:style style:name="T12" style:family="text">
      <style:text-properties officeooo:rsid="000979fd"/>
    </style:style>
    <style:style style:name="T13" style:family="text">
      <style:text-properties style:font-name="Times New Roman" fo:font-size="12pt" fo:font-weight="bold" officeooo:rsid="0009a48f" style:font-size-asian="12pt" style:font-size-complex="12pt"/>
    </style:style>
    <style:style style:name="T14" style:family="text">
      <style:text-properties officeooo:rsid="000b240c"/>
    </style:style>
    <style:style style:name="T15" style:family="text">
      <style:text-properties style:font-name="Times New Roman" fo:font-size="12pt" fo:font-weight="bold" officeooo:rsid="000dd79e" style:font-size-asian="12pt" style:font-size-complex="12pt"/>
    </style:style>
    <style:style style:name="T16" style:family="text">
      <style:text-properties style:font-name="Times New Roman" fo:font-size="12pt" fo:font-weight="bold" officeooo:rsid="000de4d2" style:font-size-asian="12pt" style:font-size-complex="12pt"/>
    </style:style>
    <style:style style:name="T17" style:family="text">
      <style:text-properties fo:font-weight="bold" officeooo:rsid="000de4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nventures</text:p>
      <text:p text:style-name="Subtitle">Fejlesz<text:span text:style-name="T1">tési</text:span> <text:span text:style-name="T1">d</text:span>okumentáci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észítette: Dombi Balázs Sándor (Neptun kód: IO4EHV), 2026, Tokaj-Hegyalja Egyetem</text:p>
      <text:h text:style-name="P3" text:outline-level="2"><text:soft-page-break/>1. <text:span text:style-name="T2">Á</text:span>ttekintés</text:h>
      <text:p text:style-name="P4">A <text:span text:style-name="T3">Binventures</text:span> eg<text:span text:style-name="T4">y </text:span>felülnézetes, procedurálisan generált 3D-s labirintusjáték, amely az oktatást és a feszültségkeltést ötvözi <text:span text:style-name="T4">és a Godot Engine-el készült</text:span>. A játékos célja, hogy eljusson a labirintus végén található zöld kijárathoz (ExitZone), miközben elkerüli a folyamatosan közeledő, őrjáratozó ellenséget (ShorcutEnemy).</text:p>
      <text:p text:style-name="P4">A játék egyedi mechanikája, hogy a folyosókat "elszabadult elektronok" (BinaryObstacles) zárják el. Ha a játékos ezekbe ütközik, a rendszer egy decimális számot generál, amelyet a játékosnak valós időben bináris formátumra kell konvertálnia és begépelnie. A helyes válasz 30 másodpercre megbénítja az üldözőt, taktikai előnyt biztosítva a meneküléshez.</text:p>
      <text:h text:style-name="P3" text:outline-level="2">2. Játékmenet</text:h>
      <text:h text:style-name="P5" text:outline-level="3">Irányítás</text:h>
      <text:list text:style-name="L1">
        <text:list-item>
          <text:p text:style-name="P6"><text:span text:style-name="T3">W, A, S, D / Nyilak:</text:span> A karakter (ciánkék hatszög) mozgatása a 3D térben.</text:p>
        </text:list-item>
        <text:list-item>
          <text:p text:style-name="P6"><text:span text:style-name="T3">M:</text:span> Háttérzene némítása / elindítása.</text:p>
        </text:list-item>
        <text:list-item>
          <text:p text:style-name="P6"><text:span text:style-name="T3">ESC:</text:span> Azonnali kilépés a játékból (asztalra).</text:p>
        </text:list-item>
        <text:list-item>
          <text:p text:style-name="P6"><text:span text:style-name="T3">Számok (0, 1) + Enter:</text:span> Bináris kód megadása az akadályoknál.</text:p>
        </text:list-item>
      </text:list>
      <text:h text:style-name="P7" text:outline-level="3">Játékelemek</text:h>
      <text:list text:style-name="L2">
        <text:list-item>
          <text:p text:style-name="P8"><text:span text:style-name="T5">Játékos (Player):</text:span><text:span text:style-name="T6"> Cián színű, világító henger, </text:span><text:span text:style-name="T7">terv szerint </text:span><text:span text:style-name="T6">fekete körvonallal, </text:span><text:span text:style-name="T7">de végül az valamiért nem működött</text:span><text:span text:style-name="T6">. Mozgása szigorúan a talajhoz van rögzítve (</text:span><text:span text:style-name="Source_20_Text"><text:span text:style-name="T6">MotionModeEnum.Grounded</text:span></text:span><text:span text:style-name="T6">), kiküszöbölve a falakon való átcsúszást.</text:span></text:p>
        </text:list-item>
        <text:list-item>
          <text:p text:style-name="P9"><text:span text:style-name="T3">Kijárat (ExitZone):</text:span> Zöld neon oszlop. Érintése azonnali győzelmet jelent.</text:p>
        </text:list-item>
        <text:list-item>
          <text:p text:style-name="P9"><text:span text:style-name="T3">Akadályok (BinaryObstacle):</text:span> Magenta színű prizmák. Érintésük leállítja a játékos haladását, és előhívja a puzzle UI-t. A helyes megoldás megsemmisíti az akadályt és leállítja az ellenséget.</text:p>
        </text:list-item>
        <text:list-item>
          <text:p text:style-name="P9"><text:span text:style-name="T3">Ellenség (ShorcutEnemy):</text:span> Vörös, osztott felületű kocka. A játék kezdetekor 30 másodpercig várakozik, majd A* (A-Star) útvonalkereséssel kezdi el üldözni a játékost. Ha puzzle van folyamatban, az útvonalkeresés helyett agresszíven, egyenes vonalban közelít.</text:p>
        </text:list-item>
      </text:list>
      <text:h text:style-name="P3" text:outline-level="2"><text:soft-page-break/>3. Rendszerarchitektúra és <text:span text:style-name="T8">o</text:span>sztályok</text:h>
      <text:p text:style-name="P10"><text:span text:style-name="T6">A játék objektumorientált, moduláris felépítést használ. A központi logikát a </text:span><text:span text:style-name="Source_20_Text"><text:span text:style-name="T6">Main</text:span></text:span><text:span text:style-name="T6"> és a </text:span><text:span text:style-name="Source_20_Text"><text:span text:style-name="T6">GameUI</text:span></text:span><text:span text:style-name="T6"> osztályok vezérlik, míg a fizikai entitások saját önálló viselkedéssel (komponensekkel) rendelkeznek.</text:span></text:p>
      <text:p text:style-name="P11">Osztályok összefoglaló táblázata</text:p>
      <text:p text:style-name="P12"/>
      <table:table table:name="Táblázat1" table:style-name="Táblázat1" table:template-name="Simple Grid Rows">
        <table:table-column table:style-name="Táblázat1.A" table:number-columns-repeated="3"/>
        <table:table-row>
          <table:table-cell table:style-name="Táblázat1.A1" office:value-type="string">
            <text:p text:style-name="P13">Osztály neve</text:p>
          </table:table-cell>
          <table:table-cell table:style-name="Táblázat1.B1" office:value-type="string">
            <text:p text:style-name="P13">Szülő típus</text:p>
          </table:table-cell>
          <table:table-cell table:style-name="Táblázat1.A1" office:value-type="string">
            <text:p text:style-name="P13">Felelősség</text:p>
          </table:table-cell>
        </table:table-row>
        <table:table-row>
          <table:table-cell table:style-name="Táblázat1.A2" office:value-type="string">
            <text:p text:style-name="P13">Main</text:p>
          </table:table-cell>
          <table:table-cell table:style-name="Táblázat1.B2" office:value-type="string">
            <text:p text:style-name="P13">Node3D</text:p>
          </table:table-cell>
          <table:table-cell table:style-name="Táblázat1.C2" office:value-type="string">
            <text:p text:style-name="P14">Pályagenerálás, környezet beállítása, globális inputok (ESC, M), entitások példányosítása. </text:p>
          </table:table-cell>
        </table:table-row>
        <table:table-row>
          <table:table-cell table:style-name="Táblázat1.A3" office:value-type="string">
            <text:p text:style-name="P13">GameUI</text:p>
          </table:table-cell>
          <table:table-cell table:style-name="Táblázat1.B3" office:value-type="string">
            <text:p text:style-name="P13">CanvasLayer</text:p>
          </table:table-cell>
          <table:table-cell table:style-name="Táblázat1.C3" office:value-type="string">
            <text:p text:style-name="P14">Felhasználói felület (Főmenü, Game Over, Puzzle képernyő) és játékállapot-kezelés. </text:p>
          </table:table-cell>
        </table:table-row>
        <table:table-row>
          <table:table-cell table:style-name="Táblázat1.A2" office:value-type="string">
            <text:p text:style-name="P13">Player</text:p>
          </table:table-cell>
          <table:table-cell table:style-name="Táblázat1.B4" office:value-type="string">
            <text:p text:style-name="P13">CharacterBody3D</text:p>
          </table:table-cell>
          <table:table-cell table:style-name="Táblázat1.C4" office:value-type="string">
            <text:p text:style-name="P14">A játékos fizikai mozgása, bemenetek (WASD) feldolgozása, vizuális megjelenítés. </text:p>
          </table:table-cell>
        </table:table-row>
        <table:table-row>
          <table:table-cell table:style-name="Táblázat1.A3" office:value-type="string">
            <text:p text:style-name="P13">ShorcutEnemy</text:p>
          </table:table-cell>
          <table:table-cell table:style-name="Táblázat1.B5" office:value-type="string">
            <text:p text:style-name="P14">CharacterBody3<text:span text:style-name="T4">D</text:span></text:p>
          </table:table-cell>
          <table:table-cell table:style-name="Táblázat1.C5" office:value-type="string">
            <text:p text:style-name="P14"><text:span text:style-name="T4">Keresési algoritmus</text:span> (A* pathfinding), időzítők kezelése, elfogás (Game Over trigger). </text:p>
          </table:table-cell>
        </table:table-row>
        <table:table-row>
          <table:table-cell table:style-name="Táblázat1.A2" office:value-type="string">
            <text:p text:style-name="P13">BinaryObstacle</text:p>
          </table:table-cell>
          <table:table-cell table:style-name="Táblázat1.B6" office:value-type="string">
            <text:p text:style-name="P14">Area3D</text:p>
          </table:table-cell>
          <table:table-cell table:style-name="Táblázat1.C6" office:value-type="string">
            <text:p text:style-name="P14">Véletlenszerű szám generálása, ütközésérzékelés, UI értesítése (Signal) a feladatról. </text:p>
          </table:table-cell>
        </table:table-row>
        <table:table-row>
          <table:table-cell table:style-name="Táblázat1.A3" office:value-type="string">
            <text:p text:style-name="P13">ExitZone</text:p>
          </table:table-cell>
          <table:table-cell table:style-name="Táblázat1.B7" office:value-type="string">
            <text:p text:style-name="P14">Area3D</text:p>
          </table:table-cell>
          <table:table-cell table:style-name="Táblázat1.C7" office:value-type="string">
            <text:p text:style-name="P14">A pálya végi célterület, ütközés esetén a győzelmi képernyő meghívása. </text:p>
          </table:table-cell>
        </table:table-row>
        <table:table-row>
          <table:table-cell table:style-name="Táblázat1.A8" office:value-type="string">
            <text:p text:style-name="P13">MusicManager</text:p>
          </table:table-cell>
          <table:table-cell table:style-name="Táblázat1.B8" office:value-type="string">
            <text:p text:style-name="P14">AudioStreamPlay<text:span text:style-name="T4">er</text:span></text:p>
          </table:table-cell>
          <table:table-cell table:style-name="Táblázat1.C8" office:value-type="string">
            <text:p text:style-name="P14">Globális háttérzene kezelése, lejátszás/szüneteltetés logikája. </text:p>
          </table:table-cell>
        </table:table-row>
      </table:table>
      <text:p text:style-name="P12"/>
      <text:h text:style-name="P15" text:outline-level="2">4. Részletes <text:span text:style-name="T9">modul dokumentáció</text:span></text:h>
      <text:h text:style-name="P7" text:outline-level="3">4.1. Main.cs (Központi <text:span text:style-name="T9">v</text:span>ezérlő)</text:h>
      <text:p text:style-name="P10"><text:span text:style-name="T6">A </text:span><text:span text:style-name="Source_20_Text"><text:span text:style-name="T6">Main</text:span></text:span><text:span text:style-name="T6"> osztály felel a játék világának felépítéséért.</text:span></text:p>
      <text:list text:style-name="L3">
        <text:list-item>
          <text:p text:style-name="P16"><text:soft-page-break/><text:span text:style-name="T5">Környezet:</text:span><text:span text:style-name="T6"> Konfigurálja a </text:span><text:span text:style-name="Source_20_Text"><text:span text:style-name="T6">WorldEnvironment</text:span></text:span><text:span text:style-name="T6"> beállításokat, bekapcsolja a </text:span><text:span text:style-name="Source_20_Text"><text:span text:style-name="T6">GlowEnabled</text:span></text:span><text:span text:style-name="T6"> funkciót és az additív blendelést a vaporwave/neon hatás eléréséhez.</text:span></text:p>
        </text:list-item>
        <text:list-item>
          <text:p text:style-name="P16"><text:span text:style-name="T5">Procedurális </text:span><text:span text:style-name="T10">g</text:span><text:span text:style-name="T5">enerálás:</text:span><text:span text:style-name="T6"> Egy mélységi keresés (Depth-First Search) alapú algoritmust futtat egy 51x51-es rácson (</text:span><text:span text:style-name="Source_20_Text"><text:span text:style-name="T6">_mazeMap</text:span></text:span><text:span text:style-name="T6">). Üres folyosókat vág a tömör falakba.</text:span></text:p>
        </text:list-item>
        <text:list-item>
          <text:p text:style-name="P16"><text:span text:style-name="T5">Navigáció:</text:span><text:span text:style-name="T6"> Létrehoz egy </text:span><text:span text:style-name="Source_20_Text"><text:span text:style-name="T6">AStarGrid2D</text:span></text:span><text:span text:style-name="T6"> példányt (</text:span><text:span text:style-name="Source_20_Text"><text:span text:style-name="T6">PathGrid</text:span></text:span><text:span text:style-name="T6">), beállítja a járhatatlan cellákat a falak alapján, hogy az ellenség tudjon tájékozódni.</text:span></text:p>
        </text:list-item>
        <text:list-item>
          <text:p text:style-name="P16"><text:span text:style-name="T5">Biztonságos </text:span><text:span text:style-name="T11">s</text:span><text:span text:style-name="T5">pawn:</text:span><text:span text:style-name="T6"> A </text:span><text:span text:style-name="Source_20_Text"><text:span text:style-name="T6">PlaceEnemyBehind</text:span></text:span><text:span text:style-name="T6"> és a </text:span><text:span text:style-name="Source_20_Text"><text:span text:style-name="T6">FindSafePlayerSpawn</text:span></text:span><text:span text:style-name="T6"> metódusok garantálják, hogy a játékos és az ellenség üres, de egymáshoz közeli cellákon kezdjenek anélkül, hogy a fizikai motor összeakasztaná őket a falakkal.</text:span></text:p>
        </text:list-item>
      </text:list>
      <text:h text:style-name="P7" text:outline-level="3">4.2. GameUI.cs (<text:span text:style-name="T9">á</text:span>llapotgép és <text:span text:style-name="T12">f</text:span>elület)</text:h>
      <text:p text:style-name="P10"><text:span text:style-name="T6">A teljes felhasználói felületet kódolva hozza létre a </text:span><text:span text:style-name="Source_20_Text"><text:span text:style-name="T6">_Ready</text:span></text:span><text:span text:style-name="T6"> metódusban, minimalizálva a Godot vizuális szerkesztőjétől való függőséget.</text:span></text:p>
      <text:list text:style-name="L4">
        <text:list-item>
          <text:p text:style-name="P17"><text:span text:style-name="T5">Singleton </text:span><text:span text:style-name="T13">p</text:span><text:span text:style-name="T5">attern:</text:span><text:span text:style-name="T6"> A </text:span><text:span text:style-name="Source_20_Text"><text:span text:style-name="T6">GameUI.Instance</text:span></text:span><text:span text:style-name="T6"> statikus változón keresztül a rendszer bármely pontjáról elérhető.</text:span></text:p>
        </text:list-item>
        <text:list-item>
          <text:p text:style-name="P17"><text:span text:style-name="T5">Állapotok:</text:span><text:span text:style-name="T6"> Statikus bool flagek (</text:span><text:span text:style-name="Source_20_Text"><text:span text:style-name="T6">IsMainMenuActive</text:span></text:span><text:span text:style-name="T6">, </text:span><text:span text:style-name="Source_20_Text"><text:span text:style-name="T6">IsPuzzleActive</text:span></text:span><text:span text:style-name="T6">, </text:span><text:span text:style-name="Source_20_Text"><text:span text:style-name="T6">IsGameOver</text:span></text:span><text:span text:style-name="T6">) szabályozzák, hogy a többi entitás mikor mozoghat.</text:span></text:p>
        </text:list-item>
        <text:list-item>
          <text:p text:style-name="P17"><text:span text:style-name="T5">Adatellenőrzés:</text:span><text:span text:style-name="T6"> Az </text:span><text:span text:style-name="Source_20_Text"><text:span text:style-name="T6">OnTextSubmitted</text:span></text:span><text:span text:style-name="T6"> metódus kezeli a játékos válaszát. A </text:span><text:span text:style-name="Source_20_Text"><text:span text:style-name="T6">Convert.ToInt32(newText, 2)</text:span></text:span><text:span text:style-name="T6"> beépített .NET függvénnyel validálja, hogy a megadott kód megegyezik-e a generált decimális számmal.</text:span></text:p>
        </text:list-item>
      </text:list>
      <text:h text:style-name="P7" text:outline-level="3">4.3. ShorcutEnemy.c<text:span text:style-name="T14">s</text:span></text:h>
      <text:p text:style-name="P4">A játék feszültségforrása.</text:p>
      <text:list text:style-name="L5">
        <text:list-item>
          <text:p text:style-name="P18"><text:span text:style-name="T6">Két sebességi profillal rendelkezik: </text:span><text:span text:style-name="Source_20_Text"><text:span text:style-name="T6">_normalSpeed</text:span></text:span><text:span text:style-name="T6"> (szabad bolyongáskor) és </text:span><text:span text:style-name="Source_20_Text"><text:span text:style-name="T6">_creepingSpeed</text:span></text:span><text:span text:style-name="T6"> (amikor a játékos a puzzle-lel küzd).</text:span></text:p>
        </text:list-item>
        <text:list-item>
          <text:p text:style-name="P18"><text:span text:style-name="T6">A </text:span><text:span text:style-name="Source_20_Text"><text:span text:style-name="T6">StartWaitTimer</text:span></text:span><text:span text:style-name="T6"> aszinkron </text:span><text:span text:style-name="Source_20_Text"><text:span text:style-name="T6">await ToSignal</text:span></text:span><text:span text:style-name="T6"> metódussal biztosítja az induláskori 30 másodperces békét.</text:span></text:p>
        </text:list-item>
        <text:list-item>
          <text:p text:style-name="P18"><text:span text:style-name="T6">A </text:span><text:span text:style-name="Source_20_Text"><text:span text:style-name="T6">FreezeFor30Seconds</text:span></text:span><text:span text:style-name="T6"> publikus metódus lehetővé teszi, hogy a sikeres puzzle-megoldás kívülről "kikapcsolja" az ellenséget és visszavegye a neonfényének erejét.</text:span></text:p>
        </text:list-item>
      </text:list>
      <text:h text:style-name="P3" text:outline-level="2"><text:soft-page-break/>5. Ismert <text:span text:style-name="T14">h</text:span>ibák (<text:span text:style-name="T9">b</text:span>ug<text:span text:style-name="T14">ok)</text:span></text:h>
      <text:p text:style-name="P4">A jelenlegi verzióban (v1.0) egy kritikus hiba azonosításra került a felhasználói visszajelzések alapján.</text:p>
      <text:p text:style-name="P10"><text:span text:style-name="T5">Leírás:</text:span><text:span text:style-name="T6"> Nem működik a "KILÉPÉS" gomb a Game Over képernyőn, miután az ellenség elkapta a játékost. </text:span><text:span text:style-name="T5">Kiváltó ok:</text:span><text:span text:style-name="T6"> Amikor az ellenség elkapja a játékost, a </text:span><text:span text:style-name="Source_20_Text"><text:span text:style-name="T6">ShowGameOver</text:span></text:span><text:span text:style-name="T6"> meghívódik a </text:span><text:span text:style-name="Source_20_Text"><text:span text:style-name="T6">GameUI</text:span></text:span><text:span text:style-name="T6">-ban, megjelenik a menü, és láthatóvá válik a "KILÉPÉS" gomb, amely az </text:span><text:span text:style-name="Source_20_Text"><text:span text:style-name="T6">OnQuitPressed</text:span></text:span><text:span text:style-name="T6"> metódusra (</text:span><text:span text:style-name="Source_20_Text"><text:span text:style-name="T6">GetTree().Quit()</text:span></text:span><text:span text:style-name="T6">) van kötve. A hiba általában két dologból eredhet a Godot-ban:</text:span></text:p>
      <text:list text:style-name="L6">
        <text:list-item>
          <text:p text:style-name="P19"><text:span text:style-name="T5">Gombok fókusza </text:span><text:span text:style-name="T15">és k</text:span><text:span text:style-name="T5">attintási maszk (</text:span><text:span text:style-name="T15">m</text:span><text:span text:style-name="T5">o</text:span><text:span text:style-name="T15">u</text:span><text:span text:style-name="T5">se </text:span><text:span text:style-name="T15">f</text:span><text:span text:style-name="T5">ilter):</text:span><text:span text:style-name="T6"> Amikor a Game Over képernyő megjelenik, előfordulhat, hogy a teljes képernyős </text:span><text:span text:style-name="Source_20_Text"><text:span text:style-name="T6">_dimmer</text:span></text:span><text:span text:style-name="T6"> (ColorRect) blokkolja az egérkattintásokat (mivel a hierarchiában az UI elemek alatt/felett van). Ha a </text:span><text:span text:style-name="Source_20_Text"><text:span text:style-name="T6">MouseFilter</text:span></text:span><text:span text:style-name="T6"> értéke </text:span><text:span text:style-name="Source_20_Text"><text:span text:style-name="T6">Stop</text:span></text:span><text:span text:style-name="T6">, a kattintás nem jut el a gombhoz.</text:span></text:p>
        </text:list-item>
        <text:list-item>
          <text:p text:style-name="P19"><text:span text:style-name="T5">Szüneteltetés (</text:span><text:span text:style-name="T16">p</text:span><text:span text:style-name="T5">ause </text:span><text:span text:style-name="T16">m</text:span><text:span text:style-name="T5">ode):</text:span><text:span text:style-name="T6"> Bár jelenleg a kód nem állítja a </text:span><text:span text:style-name="Source_20_Text"><text:span text:style-name="T6">GetTree().Paused = true;</text:span></text:span><text:span text:style-name="T6"> állapotot, ha a jövőben bekerül, a gombok alapértelmezés szerint nem reagálnak szüneteltetett állapotban..</text:span></text:p>
        </text:list-item>
      </text:list>
      <text:h text:style-name="P3" text:outline-level="2">6. Jövőbeli Fejlesztési Lehetőségek (Roadmap)</text:h>
      <text:p text:style-name="P4">A projekt robusztus alapokkal rendelkezik, amelyek az alábbi funkciókkal bővíthetők a jövőben:</text:p>
      <text:list text:style-name="L7">
        <text:list-item>
          <text:p text:style-name="P20"><text:span text:style-name="T5">Procedurális </text:span><text:span text:style-name="T16">n</text:span><text:span text:style-name="T5">ehézség:</text:span><text:span text:style-name="T6"> A labirintus méretének (</text:span><text:span text:style-name="Source_20_Text"><text:span text:style-name="T6">MazeWidth</text:span></text:span><text:span text:style-name="T6">, </text:span><text:span text:style-name="Source_20_Text"><text:span text:style-name="T6">MazeHeight</text:span></text:span><text:span text:style-name="T6">) és az akadályok számának növelése minden sikeres pálya után.</text:span></text:p>
        </text:list-item>
        <text:list-item>
          <text:p text:style-name="P21"><text:span text:style-name="T3">Időmérő (</text:span><text:span text:style-name="T17">s</text:span><text:span text:style-name="T3">peedrun mód):</text:span> Egy HUD elem, amely méri a pálya teljesítésének idejét.</text:p>
        </text:list-item>
        <text:list-item>
          <text:p text:style-name="P21"><text:span text:style-name="T3">Különböző </text:span><text:span text:style-name="T17">s</text:span><text:span text:style-name="T3">zámrendszerek:</text:span> Akadályok bevezetése, ahol nemcsak bináris, hanem hexadecimális (16-os) vagy oktális (8-as) konverziót is el kell végezni, eltérő színű prizmákkal jelölve.</text:p>
          <text:p text:style-name="P21"/>
        </text:list-item>
      </text:list>
      <text:p text:style-name="P22">7. Képernyőfotók (<text:span text:style-name="T9">s</text:span>creenshotok)</text:p>
      <text:p text:style-name="P23">A játék elindításakor a menü: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Kép1" text:anchor-type="char" svg:width="17cm" svg:height="9.666cm" draw:z-index="0"><draw:image xlink:href="Pictures/10000001000004A3000002A38AF9473A.png" xlink:type="simple" xlink:show="embed" xlink:actuate="onLoad" draw:mime-type="image/png"/></draw:frame><text:soft-page-break/></text:p>
      <text:p text:style-name="P23">A játék elkezdése:</text:p>
      <text:p text:style-name="P24"><draw:frame draw:style-name="fr1" draw:name="Kép2" text:anchor-type="char" svg:width="17cm" svg:height="9.624cm" draw:z-index="1"><draw:image xlink:href="Pictures/10000001000004AA000002A46A22A71A.png" xlink:type="simple" xlink:show="embed" xlink:actuate="onLoad" draw:mime-type="image/png"/></draw:frame></text:p>
      <text:p text:style-name="P23">Ha az enemy elkapja a playert:</text:p>
      <text:p text:style-name="P24"><draw:frame draw:style-name="fr1" draw:name="Kép3" text:anchor-type="char" svg:width="17cm" svg:height="9.624cm" draw:z-index="2"><draw:image xlink:href="Pictures/10000001000004A3000002A0A3146DC9.png" xlink:type="simple" xlink:show="embed" xlink:actuate="onLoad" draw:mime-type="image/png"/></draw:frame><text:soft-page-break/></text:p>
      <text:p text:style-name="P23">Számrendszerek közötti átváltás:</text:p>
      <text:p text:style-name="P23"><draw:frame draw:style-name="fr2" draw:name="Kép4" text:anchor-type="char" svg:width="17cm" svg:height="9.783cm" draw:z-index="3"><draw:image xlink:href="Pictures/1000000100000495000002A37E192B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hu" number:country="HU">
      <number:number number:min-integer-digits="1"/>
    </number:number-style>
    <number:text-style style:name="N20100" number:language="hu" number:country="HU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21:22:41.240940500</meta:creation-date>
    <dc:date>2026-05-28T21:51:56.011957900</dc:date>
    <meta:editing-duration>PT17M14S</meta:editing-duration>
    <meta:editing-cycles>13</meta:editing-cycles>
    <meta:generator>LibreOffice/25.8.7.3$Windows_X86_64 LibreOffice_project/30742500f2d3eb4366ac312fa33d3dcabdb3eba5</meta:generator>
    <meta:document-statistic meta:table-count="1" meta:image-count="4" meta:object-count="0" meta:page-count="7" meta:paragraph-count="77" meta:word-count="821" meta:character-count="6291" meta:non-whitespace-character-count="5563"/>
  </office:meta>
</office:document-meta>
</file>